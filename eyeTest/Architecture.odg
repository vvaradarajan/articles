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7cm" fo:min-width="12.39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58cm" fo:min-width="2.51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4cm" fo:min-width="3.537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4cm" fo:min-width="4.24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58cm" fo:min-width="3.502cm" loext:decorative="false"/>
      <style:paragraph-properties style:writing-mode="lr-tb"/>
    </style:style>
    <style:style style:name="gr6" style:family="graphic" style:parent-style-name="standard">
      <style:graphic-properties draw:fill="solid" draw:fill-color="#ffd8ce" draw:textarea-horizontal-align="justify" draw:textarea-vertical-align="middle" draw:auto-grow-height="false" fo:min-height="14.641cm" fo:min-width="3.6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textarea-vertical-align="middle" loext:decorative="false"/>
    </style:style>
    <style:style style:name="gr9" style:family="graphic" style:parent-style-name="standard">
      <style:graphic-properties draw:fill="solid" draw:fill-color="#ff8000" draw:textarea-horizontal-align="justify" draw:textarea-vertical-align="middle" draw:auto-grow-height="false" fo:min-height="1.309cm" fo:min-width="2.092cm" loext:decorative="false"/>
      <style:paragraph-properties style:writing-mode="lr-tb"/>
    </style:style>
    <style:style style:name="gr10" style:family="graphic" style:parent-style-name="standard">
      <style:graphic-properties draw:fill="solid" draw:fill-color="#ffd8ce" draw:textarea-horizontal-align="left" draw:textarea-vertical-align="middle" draw:auto-grow-height="false" fo:min-height="9.485cm" fo:min-width="2.85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8c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 draw:fill-color="#ff8000"/>
      <style:paragraph-properties fo:text-align="center"/>
    </style:style>
    <style:style style:name="P6" style:family="paragraph">
      <style:paragraph-properties fo:text-align="left" loext:tab-stop-distance="0cm">
        <style:tab-stops>
          <style:tab-stop style:position="0.076cm"/>
        </style:tab-stops>
      </style:paragraph-properties>
    </style:style>
    <style:style style:name="P7" style:family="paragraph">
      <loext:graphic-properties draw:fill="solid" draw:fill-color="#ffd8ce"/>
      <style:paragraph-properties fo:text-align="left" loext:tab-stop-distance="0cm">
        <style:tab-stops>
          <style:tab-stop style:position="0.076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9cm" svg:height="1.357cm" svg:x="4.511cm" svg:y="2.646cm">
          <text:p text:style-name="P1">Vision Diagnosis using V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018cm" svg:height="2.408cm" svg:x="4.139cm" svg:y="6.547cm">
          <text:p text:style-name="P1">Monitor</text:p>
          <text:p text:style-name="P1">graphic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018cm" svg:height="2.408cm" svg:x="4.138cm" svg:y="10.922cm">
          <text:p text:style-name="P1">VR</text:p>
          <text:p text:style-name="P1">graphics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037cm" svg:height="2.544cm" svg:x="13.459cm" svg:y="6.547cm">
          <text:p text:style-name="P1">Voice commands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4.748cm" svg:height="2.544cm" svg:x="13.067cm" svg:y="13.409cm">
          <text:p text:style-name="P1">Map to </text:p>
          <text:p text:style-name="P1"><text:s/>App</text:p>
          <text:p text:style-name="P1">commands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4.002cm" svg:height="2.408cm" svg:x="8.341cm" svg:y="6.501cm">
          <text:p text:style-name="P1">App</text:p>
          <text:p text:style-name="P1">Commands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4.105cm" svg:height="14.891cm" svg:x="8.242cm" svg:y="10.007cm">
          <text:p text:style-name="P1">.dbl vision</text:p>
          <text:p text:style-name="P1">.eye pres</text:p>
          <text:p text:style-name="P1">.astigmatism</text:p>
          <text:p text:style-name="P1">.</text:p>
          <text:p text:style-name="P1">.</text:p>
          <text:p text:style-name="P1">Move up</text:p>
          <text:p text:style-name="P1">down</text:p>
          <text:p text:style-name="P1">left</text:p>
          <text:p text:style-name="P1">right</text:p>
          <text:p text:style-name="P1"/>
          <text:p text:style-name="P1">ProgressiveSmooth move </text:p>
          <text:p text:style-name="P1"/>
          <text:p text:style-name="P1">Shrink</text:p>
          <text:p text:style-name="P1">expand</text:p>
          <text:p text:style-name="P1"/>
          <text:p text:style-name="P1">stop</text:p>
          <text:p text:style-name="P1">Save</text:p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76cm" svg:height="0.962cm" svg:x="6.79cm" svg:y="4.715cm">
          <draw:text-box>
            <text:p text:style-name="P3"><text:span text:style-name="T1">Architectural Components</text:span></text:p>
          </draw:text-box>
        </draw:frame>
        <draw:line draw:style-name="gr8" draw:text-style-name="P1" draw:layer="layout" svg:x1="5.525cm" svg:y1="12.448cm" svg:x2="7.024cm" svg:y2="12.448cm">
          <text:p/>
        </draw:line>
        <draw:connector draw:style-name="gr8" draw:text-style-name="P1" draw:layer="layout" svg:x1="5.648cm" svg:y1="8.955cm" svg:x2="5.647cm" svg:y2="10.922cm" draw:start-shape="id1" draw:start-glue-point="2" draw:end-shape="id2" draw:end-glue-point="0" svg:d="M5648 8955v984h-1v983" svg:viewBox="0 0 2 1968">
          <text:p/>
        </draw:connector>
        <draw:connector draw:style-name="gr8" draw:text-style-name="P1" draw:layer="layout" svg:x1="10.342cm" svg:y1="8.909cm" svg:x2="10.294cm" svg:y2="10.007cm" draw:start-shape="id3" draw:start-glue-point="2" draw:end-shape="id4" draw:end-glue-point="0" svg:d="M10342 8909v549h-48v549" svg:viewBox="0 0 49 1099">
          <text:p/>
        </draw:connector>
        <draw:custom-shape draw:style-name="gr9" draw:text-style-name="P5" xml:id="id6" draw:id="id6" draw:layer="layout" svg:width="3.664cm" svg:height="2.205cm" svg:x="13.568cm" svg:y="9.973cm">
          <text:p text:style-name="P1">A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5.477cm" svg:y1="9.091cm" svg:x2="15.4cm" svg:y2="9.973cm" draw:start-shape="id5" draw:start-glue-point="2" draw:end-shape="id6" draw:end-glue-point="4" svg:d="M15477 9091v441h-77v441" svg:viewBox="0 0 78 883">
          <text:p/>
        </draw:connector>
        <draw:connector draw:style-name="gr8" draw:text-style-name="P1" draw:layer="layout" svg:x1="15.4cm" svg:y1="12.178cm" svg:x2="15.441cm" svg:y2="13.409cm" draw:start-shape="id6" draw:start-glue-point="8" draw:end-shape="id7" draw:end-glue-point="0" svg:d="M15400 12178v616h41v615" svg:viewBox="0 0 42 1232">
          <text:p/>
        </draw:connector>
        <draw:custom-shape draw:style-name="gr10" draw:text-style-name="P7" xml:id="id8" draw:id="id8" draw:layer="layout" svg:width="3.358cm" svg:height="9.735cm" svg:x="4.172cm" svg:y="14.688cm">
          <text:p text:style-name="P6">Shapes</text:p>
          <text:p text:style-name="P6">Exact dimensions by</text:p>
          <text:p text:style-name="P6">inches</text:p>
          <text:p text:style-name="P6">angle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.647cm" svg:y1="13.33cm" svg:x2="5.851cm" svg:y2="14.688cm" draw:start-shape="id2" draw:start-glue-point="2" draw:end-shape="id8" draw:end-glue-point="0" svg:d="M5647 13330v679h204v679" svg:viewBox="0 0 205 135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b3cac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9T21:52:04.511305511</meta:creation-date>
    <dc:date>2026-05-29T22:18:35.558254809</dc:date>
    <meta:editing-duration>PT2M11S</meta:editing-duration>
    <meta:editing-cycles>1</meta:editing-cycles>
    <meta:document-statistic meta:object-count="16"/>
    <meta:generator>LibreOffice/26.2.1.2$Linux_X86_64 LibreOffice_project/8399f6259d8c87f40e7255cdb3c9b958f5e08948</meta:generator>
  </office:meta>
</office:document-meta>
</file>